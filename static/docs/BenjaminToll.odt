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Liberation Mono" fo:font-size="10pt" officeooo:paragraph-rsid="0026cc1f" style:font-name-asian="Liberation Mono" style:font-size-asian="10pt" style:font-name-complex="Liberation Mono" style:font-size-complex="10p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28f7b9"/>
    </style:style>
    <style:style style:name="P6" style:family="paragraph" style:parent-style-name="Heading_20_2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officeooo:rsid="0021da6c"/>
    </style:style>
    <style:style style:name="T2" style:family="text">
      <style:text-properties officeooo:rsid="00234cb9"/>
    </style:style>
    <style:style style:name="T3" style:family="text">
      <style:text-properties officeooo:rsid="0024d777"/>
    </style:style>
    <style:style style:name="T4" style:family="text">
      <style:text-properties officeooo:rsid="00202460"/>
    </style:style>
    <style:style style:name="T5" style:family="text">
      <style:text-properties officeooo:rsid="002674ed"/>
    </style:style>
    <style:style style:name="T6" style:family="text">
      <style:text-properties officeooo:rsid="0026cc1f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officeooo:rsid="00182a64"/>
    </style:style>
    <style:style style:name="T9" style:family="text">
      <style:text-properties officeooo:rsid="00290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enjamin Toll</text:p>
      <text:p text:style-name="Preformatted_20_Text">Princeton, MA</text:p>
      <text:p text:style-name="Preformatted_20_Text">ben.toll.works@gmail.com | benjamintoll.com | github.com/btoll</text:p>
      <text:p text:style-name="Preformatted_20_Text"/>
      <text:p text:style-name="P1">Professional Summary</text:p>
      <text:p text:style-name="Preformatted_20_Text"/>
      <text:p text:style-name="P2"><text:span text:style-name="T1">Programmer, i</text:span>nfrastructure specialist and strong debugger with 15+ years building reliable systems and testing infrastructure. Expert at identifying root causes in complex distributed systems and building deterministic CI/CD pipelines. Proven track record fixing broken test frameworks and enabling teams through automation and clear documentation.</text:p>
      <text:p text:style-name="Preformatted_20_Text"/>
      <text:p text:style-name="P1">Technical Skills</text:p>
      <text:p text:style-name="Preformatted_20_Text"/>
      <text:p text:style-name="P2">Testing &amp; Debugging - Ginkgo, Go test framework, remote debugging (Delve), deterministic test design, identifying and fixing flaky tests, end-to-end testing</text:p>
      <text:p text:style-name="P2">CI/CD &amp; Automation - Jenkins (declarative pipelines, Groovy), GitHub Actions, GitLab, Buildkite, CircleCI, Prow, shell scripting, infrastructure automation</text:p>
      <text:p text:style-name="P2">Languages - Go, Bash, Python, C, JavaScript, Ruby</text:p>
      <text:p text:style-name="P2">Infrastructure &amp; Tools – <text:span text:style-name="T2">Linux, </text:span>Kubernetes, OpenShift (ROSA), <text:span text:style-name="T3">containers (Podman</text:span>, <text:span text:style-name="T3">Docker)</text:span>, <text:span text:style-name="T2">Ansible, </text:span>AWS</text:p>
      <text:p text:style-name="Preformatted_20_Text"/>
      <text:p text:style-name="Preformatted_20_Text"/>
      <text:p text:style-name="P1">Professional Experience</text:p>
      <text:p text:style-name="Preformatted_20_Text"/>
      <text:p text:style-name="Preformatted_20_Text">Red Hat</text:p>
      <text:p text:style-name="Preformatted_20_Text">Senior Software Engineer <text:span text:style-name="T4">(I</text:span>nfrastructure<text:span text:style-name="T4">) and </text:span>Team Lead | October 2024 – September 2025</text:p>
      <text:p text:style-name="Preformatted_20_Text"/>
      <text:p text:style-name="P2">• <text:span text:style-name="T5">Bu</text:span>ilt reproducible remote debugging infrastructure (Delve, custom images, port-forwarding workflows) enabling the team to validate operators in live clusters without guesswork.</text:p>
      <text:p text:style-name="P2">• Automated cluster provisioning with shell scripts implementing idempotency checks, state polling, dependency validation, and clear failure logging; reduced manual setup errors and enabled rapid, repeatable cluster creation <text:span text:style-name="T5">and other operations.</text:span></text:p>
      <text:p text:style-name="P2">• <text:span text:style-name="T5">E</text:span>liminat<text:span text:style-name="T5">ed</text:span> race conditions and non-deterministic behavior <text:span text:style-name="T5">in test suites and CI/CD builds and release pipelines</text:span>; deep experience with end-to-end testing in complex multi-component environments.</text:p>
      <text:p text:style-name="P2">• <text:span text:style-name="T5">C</text:span>omfortable with low-level troubleshooting (serial ports, noisy terminal output, hardware interaction) from prior embedded systems work.</text:p>
      <text:p text:style-name="Preformatted_20_Text"/>
      <text:p text:style-name="Preformatted_20_Text"/>
      <text:p text:style-name="Preformatted_20_Text">Veriforce</text:p>
      <text:p text:style-name="Preformatted_20_Text">Principal DevOps Engineer | December 2023 – October 2024</text:p>
      <text:p text:style-name="Preformatted_20_Text"/>
      <text:p text:style-name="P2">• Led GitOps transition for Kubernetes infrastructure; designed and documented deployment validation workflows that reduced rollback incidents by catching configuration errors before production.</text:p>
      <text:p text:style-name="P3"><text:soft-page-break/>• Evaluated Flux and Argo, built a business case for Flux based on our architecture and constraints. Wrote Go tooling using Kubernetes <text:span text:style-name="T6">api</text:span>machinery <text:span text:style-name="T6">libraries </text:span>to detect configuration drift <text:span text:style-name="T6">between</text:span> live clusters (developers were making changes through Rancher UI) <text:span text:style-name="T6">and</text:span> state <text:span text:style-name="T6">in </text:span>GitHub, and generated YAML migrations—solving the critical problem of moving from manual configuration to source of truth without losing existing work.</text:p>
      <text:p text:style-name="P2">• Designed and maintained CI/CD pipelines using Jenkins and GitHub Actions for microservices deployments on Kubernetes.</text:p>
      <text:p text:style-name="P2">• Automated infrastructure provisioning and configuration management using Ansible and shell scripting.</text:p>
      <text:p text:style-name="P4"/>
      <text:p text:style-name="Preformatted_20_Text"/>
      <text:p text:style-name="Preformatted_20_Text">Taos/IBM</text:p>
      <text:p text:style-name="Preformatted_20_Text">Senior Software and DevOps Engineer | June 2021 – October 2022</text:p>
      <text:p text:style-name="Preformatted_20_Text"/>
      <text:p text:style-name="P2">• Built and maintained CI/CD pipelines using Jenkins and Kubernetes for distributed systems; designed validation workflows to catch configuration drift and deployment errors.</text:p>
      <text:p text:style-name="P2">• Automated infrastructure provisioning and cluster management, reducing manual operational overhead.</text:p>
      <text:p text:style-name="Preformatted_20_Text"/>
      <text:p text:style-name="Preformatted_20_Text"/>
      <text:p text:style-name="Preformatted_20_Text">Algorand</text:p>
      <text:p text:style-name="Preformatted_20_Text">DevOps Engineer | November 2019 – February 2021</text:p>
      <text:p text:style-name="Preformatted_20_Text"/>
      <text:p text:style-name="P5"><text:span text:style-name="T7">• Designed CI/CD pipelines using Jenkins and Kubernetes for distributed blockchain systems; built Go tooling to validate deterministic behavior across test environments.</text:span></text:p>
      <text:p text:style-name="Preformatted_20_Text">• Conducted code reviews and enhanced security measures across application deployments.</text:p>
      <text:p text:style-name="Preformatted_20_Text"/>
      <text:p text:style-name="Preformatted_20_Text"/>
      <text:p text:style-name="Preformatted_20_Text">Consultant</text:p>
      <text:p text:style-name="Preformatted_20_Text">Software Engineer | January 2016 – October 2022</text:p>
      <text:p text:style-name="Preformatted_20_Text"/>
      <text:p text:style-name="P2">Full-stack web development and infrastructure consulting using modern web technologies and automation practices.</text:p>
      <text:p text:style-name="Preformatted_20_Text"/>
      <text:p text:style-name="Preformatted_20_Text">Sencha Inc</text:p>
      <text:p text:style-name="Preformatted_20_Text">Software Engineer | <text:span text:style-name="T8">June</text:span> 201<text:span text:style-name="T8">1</text:span> – December 2015</text:p>
      <text:p text:style-name="Preformatted_20_Text"/>
      <text:p text:style-name="Preformatted_20_Text">• Maintained and improved the Ext JavaScript framework, implementing new features and resolving critical bugs.</text:p>
      <text:p text:style-name="Preformatted_20_Text">• Contributed to internal tooling and developer productivity enhancements.</text:p>
      <text:p text:style-name="Preformatted_20_Text"/>
      <text:p text:style-name="Preformatted_20_Text"/>
      <text:p text:style-name="Preformatted_20_Text">Yahoo!</text:p>
      <text:p text:style-name="Preformatted_20_Text">Software Engineer | November 2009 – May 2011</text:p>
      <text:p text:style-name="Preformatted_20_Text"/>
      <text:p text:style-name="Preformatted_20_Text">• Developed JavaScript applications for Yahoo's Connected TV platform.</text:p>
      <text:p text:style-name="Preformatted_20_Text">• Served as principal maintainer for high-profile applications.</text:p>
      <text:p text:style-name="Preformatted_20_Text"><text:soft-page-break/></text:p>
      <text:p text:style-name="P2">Connected TV platform development; hands-on experience with hardware interaction, firmware flashing, and embedded systems diagnostics (serial ports, low-level debugging).</text:p>
      <text:h text:style-name="P6" text:outline-level="2">C<text:span text:style-name="T9">ore Strengths</text:span></text:h>
      <text:p text:style-name="P4"><text:span text:style-name="T7">Root cause diagnosis in complex systems. Building repeatable testing frameworks. Clear technical communication. Debugging infrastructure at scale. Translating IT infrastructure practices to constrained environments.</text:span></text:p>
      <text:p text:style-name="Preformatted_20_Text"/>
      <text:p text:style-name="P1">Education</text:p>
      <text:p text:style-name="Preformatted_20_Text"/>
      <text:p text:style-name="Preformatted_20_Text">University of New Mexico</text:p>
      <text:p text:style-name="Preformatted_20_Text">BA, History | 1996 – 1999</text:p>
      <text:p text:style-name="Preformatted_20_Text"/>
      <text:p text:style-name="Preformatted_20_Text">Honors: Summa Cum Laude, Phi Beta Kappa, Phi Alpha Theta</text:p>
      <text:p text:style-name="Preformatted_20_Text"/>
      <text:p text:style-name="P1">Certifications</text:p>
      <text:p text:style-name="Preformatted_20_Text"/>
      <text:p text:style-name="Preformatted_20_Text">• Certified Kubernetes Administrator (CKA)</text:p>
      <text:p text:style-name="Preformatted_20_Text">• Kubernetes and Cloud Native Associate – The Linux Foundation</text:p>
      <text:p text:style-name="Preformatted_20_Text">• Linux Essentials (LE-1) – Linux Professional Institute</text:p>
      <text:p text:style-name="Preformatted_20_Text"/>
      <text:p text:style-name="P1">Languages</text:p>
      <text:p text:style-name="Preformatted_20_Text"/>
      <text:p text:style-name="Preformatted_20_Text">• English (Native/Fluent)</text:p>
      <text:p text:style-name="Preformatted_20_Text">• Italian (Conversational)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6-21T01:59:54.971487231</dc:date>
    <meta:editing-duration>PT58M</meta:editing-duration>
    <meta:editing-cycles>16</meta:editing-cycles>
    <meta:document-statistic meta:table-count="0" meta:image-count="0" meta:object-count="0" meta:page-count="3" meta:paragraph-count="56" meta:word-count="609" meta:character-count="4710" meta:non-whitespace-character-count="4147"/>
  </office:meta>
</office:document-meta>
</file>